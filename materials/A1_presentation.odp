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JetBrains Mono" svg:font-family="'JetBrains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/>
    <style:font-face style:name="Tahoma" svg:font-family="Tahoma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f412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f0e1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svg:stroke-linecap="butt" draw:fill="solid" draw:fill-color="#c15a2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cfd5b4" svg:stroke-linecap="butt" draw:fill="solid" draw:fill-color="#f5f6e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4f6a48" svg:stroke-linecap="butt" draw:fill="solid" draw:fill-color="#2a4a3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>
      <style:graphic-properties draw:stroke="solid" svg:stroke-width="0.035cm" svg:stroke-color="#cfd5b4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solid" draw:fill-color="#c15a2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.141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.141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="solid" draw:fill-color="#f5f6e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cm" fo:margin-bottom="0.212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.212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solid" draw:fill-color="#2a4a3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cm" fo:margin-bottom="0.106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.106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a8c08a" loext:opacity="100%" style:text-outline="false" style:text-line-through-style="none" style:text-line-through-type="none" style:text-position="0% 100%" style:font-name="JetBrains Mon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f4f2e0" loext:opacity="100%" style:text-outline="false" style:text-line-through-style="none" style:text-line-through-type="none" style:text-position="0% 100%" style:font-name="Noto Sans JP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cfd5b4" loext:opacity="100%" style:text-outline="false" style:text-line-through-style="none" style:text-line-through-type="none" style:text-position="0% 100%" style:font-name="Noto Sans JP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8c9e7a" loext:opacity="100%" style:text-outline="false" style:text-line-through-style="none" style:text-line-through-type="none" style:text-position="0% 100%" style:font-name="JetBrains Mon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15a2b" loext:opacity="100%" style:text-outline="false" style:text-line-through-style="none" style:text-line-through-type="none" style:text-position="0% 100%" style:font-name="JetBrains Mono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4f6251" loext:opacity="100%" style:text-outline="false" style:text-line-through-style="none" style:text-line-through-type="none" style:text-position="0% 100%" style:font-name="JetBrains Mono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1b2a1f" loext:opacity="100%" style:text-outline="false" style:text-line-through-style="none" style:text-line-through-type="none" style:text-position="0% 100%" style:font-name="Noto Sans JP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1b2a1f" loext:opacity="100%" style:text-outline="false" style:text-line-through-style="none" style:text-line-through-type="none" style:text-position="0% 100%" style:font-name="Noto Sans JP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f6251" loext:opacity="100%" style:text-outline="false" style:text-line-through-style="none" style:text-line-through-type="none" style:text-position="0% 100%" style:font-name="JetBrains Mono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4f6251" loext:opacity="100%" style:text-outline="false" style:text-line-through-style="none" style:text-line-through-type="none" style:text-position="0% 100%" style:font-name="Noto Sans JP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1b2a1f" loext:opacity="100%" style:text-outline="false" style:text-line-through-style="none" style:text-line-through-type="none" style:text-position="0% 100%" style:font-name="Noto Sans JP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c15a2b" loext:opacity="100%" style:text-outline="false" style:text-line-through-style="none" style:text-line-through-type="none" style:text-position="0% 100%" style:font-name="JetBrains Mono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1b2a1f" loext:opacity="100%" style:text-outline="false" style:text-line-through-style="none" style:text-line-through-type="none" style:text-position="0% 100%" style:font-name="Noto Sans JP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14" style:family="text">
      <style:text-properties fo:font-variant="normal" fo:text-transform="none" fo:color="#4f6251" loext:opacity="100%" style:text-outline="false" style:text-line-through-style="none" style:text-line-through-type="none" style:text-position="0% 100%" style:font-name="Noto Sans JP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a8c08a" loext:opacity="100%" style:text-outline="false" style:text-line-through-style="none" style:text-line-through-type="none" style:text-position="0% 100%" style:font-name="JetBrains Mono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variant="normal" fo:text-transform="none" fo:color="#f4f2e0" loext:opacity="100%" style:text-outline="false" style:text-line-through-style="none" style:text-line-through-type="none" style:text-position="0% 100%" style:font-name="Noto Sans JP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f4f2e0" loext:opacity="100%" style:text-outline="false" style:text-line-through-style="none" style:text-line-through-type="none" style:text-position="0% 100%" style:font-name="Noto Sans JP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a8c08a" loext:opacity="100%" style:text-outline="false" style:text-line-through-style="none" style:text-line-through-type="none" style:text-position="0% 100%" style:font-name="Noto Sans JP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1f4128" loext:opacity="100%" style:text-outline="false" style:text-line-through-style="none" style:text-line-through-type="none" style:text-position="0% 100%" style:font-name="Noto Sans JP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4f6251" loext:opacity="100%" style:text-outline="false" style:text-line-through-style="none" style:text-line-through-type="none" style:text-position="0% 100%" style:font-name="Noto Sans JP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1f4128" loext:opacity="100%" style:text-outline="false" style:text-line-through-style="none" style:text-line-through-type="none" style:text-position="0% 100%" style:font-name="Noto Sans JP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c15a2b" loext:opacity="100%" style:text-outline="false" style:text-line-through-style="none" style:text-line-through-type="none" style:text-position="0% 100%" style:font-name="JetBrains Mono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4f6251" loext:opacity="100%" style:text-outline="false" style:text-line-through-style="none" style:text-line-through-type="none" style:text-position="0% 100%" style:font-name="Noto Sans JP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c15a2b" loext:opacity="100%" style:text-outline="false" style:text-line-through-style="none" style:text-line-through-type="none" style:text-position="0% 100%" style:font-name="JetBrains Mono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1b2a1f" loext:opacity="100%" style:text-outline="false" style:text-line-through-style="none" style:text-line-through-type="none" style:text-position="0% 100%" style:font-name="Noto Sans JP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1b2a1f" loext:opacity="100%" style:text-outline="false" style:text-line-through-style="none" style:text-line-through-type="none" style:text-position="0% 100%" style:font-name="Noto Sans JP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f4f2e0" loext:opacity="100%" style:text-outline="false" style:text-line-through-style="none" style:text-line-through-type="none" style:text-position="0% 100%" style:font-name="Noto Sans JP" fo:font-size="64pt" fo:letter-spacing="normal" fo:language="en" fo:country="US" fo:font-style="normal" style:text-underline-style="none" fo:font-weight="bold" fo:background-color="transparent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a8c08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4f2e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cfd5b4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8c9e7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c15a2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4f625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1b2a1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1f412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extBox 1" draw:style-name="gr1" draw:text-style-name="P2" draw:layer="layout" svg:width="20.319cm" svg:height="1.015cm" svg:x="2.032cm" svg:y="1.27cm">
          <text:p text:style-name="P1"><text:span text:style-name="T1">DEAF ENGINEERS AI WORKSHOP · VOL.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2" draw:layer="layout" svg:width="25.399cm" svg:height="5.079cm" svg:x="2.032cm" svg:y="5.08cm">
          <text:p text:style-name="P1"><text:span text:style-name="T2">AI</text:span><text:span text:style-name="T2">ツール遍歴と</text:span><text:span text:style-name="T2"><text:line-break/></text:span><text:span text:style-name="T2">これからの使い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5.079cm" svg:height="0.14cm" svg:x="2.032cm" svg:y="11.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" draw:layer="layout" svg:width="15.239cm" svg:height="1.523cm" svg:x="2.032cm" svg:y="12.7cm">
          <text:p text:style-name="P1"><text:span text:style-name="T3">下田 成大（しもだ なるひろ）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2" draw:layer="layout" svg:width="15.239cm" svg:height="1.523cm" svg:x="2.032cm" svg:y="14.224cm">
          <text:p text:style-name="P1"><text:span text:style-name="T4">2026.05.31 · Deaf Engineers AI Worksh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7" draw:text-style-name="P2" draw:layer="layout" svg:width="15.239cm" svg:height="1.015cm" svg:x="2.032cm" svg:y="1.524cm">
          <text:p text:style-name="P1"><text:span text:style-name="T5">INTRODU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6" draw:layer="layout" svg:width="2.539cm" svg:height="0.761cm" svg:x="30.48cm" svg:y="17.78cm">
          <text:p text:style-name="P5"><text:span text:style-name="T6">2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2" draw:layer="layout" svg:width="25.399cm" svg:height="2.031cm" svg:x="2.032cm" svg:y="3.048cm">
          <text:p text:style-name="P1"><text:span text:style-name="T7">自己紹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8" draw:layer="layout" svg:width="13.969cm" svg:height="11.429cm" svg:x="2.032cm" svg:y="6.604cm">
          <text:p text:style-name="P7"><text:span text:style-name="T8">下田 成大（だーなる）</text:span></text:p>
          <text:p text:style-name="P7"><text:span text:style-name="T8"/></text:p>
          <text:p text:style-name="P7"><text:span text:style-name="T8">DaNARU </text:span><text:span text:style-name="T8">代表（</text:span><text:span text:style-name="T8">2026</text:span><text:span text:style-name="T8">年</text:span><text:span text:style-name="T8">3</text:span><text:span text:style-name="T8">月設立）</text:span></text:p>
          <text:p text:style-name="P7"><text:span text:style-name="T8">プログラミング初心者</text:span></text:p>
          <text:p text:style-name="P7"><text:span text:style-name="T8">デフエンジニア（ろう者）</text:span></text:p>
          <text:p text:style-name="P7"><text:span text:style-name="T8"/></text:p>
          <text:p text:style-name="P7"><text:span text:style-name="T8">AI</text:span><text:span text:style-name="T8">エージェント</text:span><text:span text:style-name="T8">12</text:span><text:span text:style-name="T8">体と会社を運営中</text:span></text:p>
          <text:p text:style-name="P7"><text:span text:style-name="T8">社員は全員</text:span><text:span text:style-name="T8">AI</text:span><text:span text:style-name="T8">。人間は僕だけ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9" draw:layer="layout" svg:width="13.461cm" svg:height="10.159cm" svg:x="18.288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" draw:text-style-name="P2" draw:layer="layout" svg:width="12.191cm" svg:height="1.269cm" svg:x="19.05cm" svg:y="7.112cm">
          <text:p text:style-name="P1"><text:span text:style-name="T9">KEY VISU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11" draw:layer="layout" svg:width="12.191cm" svg:height="7.619cm" svg:x="19.05cm" svg:y="8.636cm">
          <text:p text:style-name="P10"><text:span text:style-name="T10">【ここにスクショ</text:span><text:span text:style-name="T10">を貼る】</text:span></text:p>
          <text:p text:style-name="P10"><text:span text:style-name="T10"/></text:p>
          <text:p text:style-name="P10"><text:span text:style-name="T10">候補</text:span><text:span text:style-name="T10">:</text:span></text:p>
          <text:p text:style-name="P10"><text:span text:style-name="T10">・ターミナルで</text:span><text:span text:style-name="T10">Claude Code</text:span><text:span text:style-name="T10">が動</text:span><text:span text:style-name="T10">いてる画面</text:span></text:p>
          <text:p text:style-name="P10"><text:span text:style-name="T10">・</text:span><text:span text:style-name="T10">agents.yaml </text:span><text:span text:style-name="T10">の</text:span><text:span text:style-name="T10">一部</text:span></text:p>
          <text:p text:style-name="P10"><text:span text:style-name="T10">・</text:span><text:span text:style-name="T10">AI</text:span><text:span text:style-name="T10">幕府の組織図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custom-shape draw:name="TextBox 1" draw:style-name="gr14" draw:text-style-name="P2" draw:layer="layout" svg:width="15.239cm" svg:height="1.015cm" svg:x="2.032cm" svg:y="1.524cm">
          <text:p text:style-name="P1"><text:span text:style-name="T5">CHAPTER 01 · BEFORE A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6" draw:layer="layout" svg:width="2.539cm" svg:height="0.761cm" svg:x="30.48cm" svg:y="17.78cm">
          <text:p text:style-name="P5"><text:span text:style-name="T6">3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2" draw:layer="layout" svg:width="25.399cm" svg:height="2.031cm" svg:x="2.032cm" svg:y="3.048cm">
          <text:p text:style-name="P1"><text:span text:style-name="T7">AI</text:span><text:span text:style-name="T7">以前の世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7" draw:text-style-name="P8" draw:layer="layout" svg:width="27.939cm" svg:height="11.429cm" svg:x="2.032cm" svg:y="6.604cm">
          <text:p text:style-name="P7"><text:span text:style-name="T8">プログラミング初心者だった。</text:span></text:p>
          <text:p text:style-name="P7"><text:span text:style-name="T8">コードは読めても、自分では書けなかった。</text:span></text:p>
          <text:p text:style-name="P7"><text:span text:style-name="T8"/></text:p>
          <text:p text:style-name="P7"><text:span text:style-name="T8">デフエンジニアとして働く中で感じていたこと</text:span><text:span text:style-name="T8">:</text:span></text:p>
          <text:p text:style-name="P7"><text:span text:style-name="T8">・会議の情報が音声で流れてしまう</text:span></text:p>
          <text:p text:style-name="P7"><text:span text:style-name="T8">・口頭での決定事項を後から追えない</text:span></text:p>
          <text:p text:style-name="P7"><text:span text:style-name="T8">・「聞こえる前提」のツールや文化に毎日ぶつかる</text:span></text:p>
          <text:p text:style-name="P7"><text:span text:style-name="T8"/></text:p>
          <text:p text:style-name="P7"><text:span text:style-name="T8">プログラミングを覚えたかったけど、</text:span></text:p>
          <text:p text:style-name="P7"><text:span text:style-name="T8">独学で壁にぶつかっていた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custom-shape draw:name="TextBox 1" draw:style-name="gr18" draw:text-style-name="P2" draw:layer="layout" svg:width="15.239cm" svg:height="1.015cm" svg:x="2.032cm" svg:y="1.524cm">
          <text:p text:style-name="P1"><text:span text:style-name="T5">CHAPTER 02 · FIRST CONTACT — 202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6" draw:layer="layout" svg:width="2.539cm" svg:height="0.761cm" svg:x="30.48cm" svg:y="17.78cm">
          <text:p text:style-name="P5"><text:span text:style-name="T6">4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2" draw:layer="layout" svg:width="25.399cm" svg:height="2.031cm" svg:x="2.032cm" svg:y="3.048cm">
          <text:p text:style-name="P1"><text:span text:style-name="T7">ChatGPT</text:span><text:span text:style-name="T7">との出会い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1" draw:text-style-name="P8" draw:layer="layout" svg:width="27.939cm" svg:height="11.429cm" svg:x="2.032cm" svg:y="6.604cm">
          <text:p text:style-name="P7"><text:span text:style-name="T11">2022</text:span><text:span text:style-name="T11">年</text:span><text:span text:style-name="T11">11</text:span><text:span text:style-name="T11">月</text:span><text:span text:style-name="T8"> — </text:span><text:span text:style-name="T8">ChatGPT 3.5</text:span><text:span text:style-name="T8">がリリースされた</text:span></text:p>
          <text:p text:style-name="P7"><text:span text:style-name="T8"/></text:p>
          <text:p text:style-name="P7"><text:span text:style-name="T8">新しもの好きだから飛びついた。</text:span></text:p>
          <text:p text:style-name="P7"><text:span text:style-name="T8">「これまでとは違うチャットボット」に嬉々として使い倒した。</text:span></text:p>
          <text:p text:style-name="P7"><text:span text:style-name="T8"/></text:p>
          <text:p text:style-name="P7"><text:span text:style-name="T8">……でも、いつしか飽きて使わなくなった。</text:span></text:p>
          <text:p text:style-name="P7"><text:span text:style-name="T8"/></text:p>
          <text:p text:style-name="P7"><text:span text:style-name="T11">2025</text:span><text:span text:style-name="T11">年春</text:span><text:span text:style-name="T8"> — </text:span><text:span text:style-name="T8">GPT-4o</text:span><text:span text:style-name="T8">の「ジブリ風」が流行った時、また飛びついた。</text:span></text:p>
          <text:p text:style-name="P7"><text:span text:style-name="T8">今度は飽きなかった。毎日使うようになった。</text:span></text:p>
          <text:p text:style-name="P7"><text:span text:style-name="T8"/></text:p>
          <text:p text:style-name="P7"><text:span text:style-name="T8">「キャズム」を超えた瞬間だった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TextBox 1" draw:style-name="gr22" draw:text-style-name="P2" draw:layer="layout" svg:width="15.239cm" svg:height="1.015cm" svg:x="2.032cm" svg:y="1.524cm">
          <text:p text:style-name="P1"><text:span text:style-name="T5">CHAPTER 03 · TIME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6" draw:layer="layout" svg:width="2.539cm" svg:height="0.761cm" svg:x="30.48cm" svg:y="17.78cm">
          <text:p text:style-name="P5"><text:span text:style-name="T6">5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" draw:text-style-name="P2" draw:layer="layout" svg:width="25.399cm" svg:height="2.031cm" svg:x="2.032cm" svg:y="3.048cm">
          <text:p text:style-name="P1"><text:span text:style-name="T7">AI</text:span><text:span text:style-name="T7">ツール遍歴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5" draw:text-style-name="P2" draw:layer="layout" svg:width="4.571cm" svg:height="1.269cm" svg:x="2.032cm" svg:y="6.35cm">
          <text:p text:style-name="P1"><text:span text:style-name="T12">2022.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2" draw:layer="layout" svg:width="8.127cm" svg:height="1.269cm" svg:x="7.112cm" svg:y="6.35cm">
          <text:p text:style-name="P1"><text:span text:style-name="T13">ChatGPT 3.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7" draw:text-style-name="P2" draw:layer="layout" svg:width="16.509cm" svg:height="1.269cm" svg:x="15.748cm" svg:y="6.35cm">
          <text:p text:style-name="P1"><text:span text:style-name="T14">初めての</text:span><text:span text:style-name="T14">AI</text:span><text:span text:style-name="T14">。飛びついた→飽きた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8" draw:text-style-name="P2" draw:layer="layout" svg:width="4.571cm" svg:height="1.269cm" svg:x="2.032cm" svg:y="8.001cm">
          <text:p text:style-name="P1"><text:span text:style-name="T12">2025 </text:span><text:span text:style-name="T12">春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9" draw:text-style-name="P2" draw:layer="layout" svg:width="8.127cm" svg:height="1.269cm" svg:x="7.112cm" svg:y="8.001cm">
          <text:p text:style-name="P1"><text:span text:style-name="T13">GPT-4o </text:span><text:span text:style-name="T13">復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2" draw:layer="layout" svg:width="16.509cm" svg:height="1.269cm" svg:x="15.748cm" svg:y="8.001cm">
          <text:p text:style-name="P1"><text:span text:style-name="T14">ジブリ風で再燃。今度は毎日使う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1" draw:text-style-name="P2" draw:layer="layout" svg:width="4.571cm" svg:height="1.269cm" svg:x="2.032cm" svg:y="9.652cm">
          <text:p text:style-name="P1"><text:span text:style-name="T12">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2" draw:text-style-name="P2" draw:layer="layout" svg:width="8.127cm" svg:height="1.269cm" svg:x="7.112cm" svg:y="9.652cm">
          <text:p text:style-name="P1"><text:span text:style-name="T13">Cursor / Gemin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3" draw:text-style-name="P2" draw:layer="layout" svg:width="16.509cm" svg:height="1.269cm" svg:x="15.748cm" svg:y="9.652cm">
          <text:p text:style-name="P1"><text:span text:style-name="T14">コードエディタに</text:span><text:span text:style-name="T14">AI</text:span><text:span text:style-name="T14">統合。開発が変わった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4" draw:text-style-name="P2" draw:layer="layout" svg:width="4.571cm" svg:height="1.269cm" svg:x="2.032cm" svg:y="11.303cm">
          <text:p text:style-name="P1"><text:span text:style-name="T12">2026.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5" draw:text-style-name="P2" draw:layer="layout" svg:width="8.127cm" svg:height="1.269cm" svg:x="7.112cm" svg:y="11.303cm">
          <text:p text:style-name="P1"><text:span text:style-name="T13">Claude </text:span><text:span text:style-name="T13">との出会い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6" draw:text-style-name="P2" draw:layer="layout" svg:width="16.509cm" svg:height="1.269cm" svg:x="15.748cm" svg:y="11.303cm">
          <text:p text:style-name="P1"><text:span text:style-name="T14">「判断力」の時代だと気づ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7" draw:text-style-name="P2" draw:layer="layout" svg:width="4.571cm" svg:height="1.269cm" svg:x="2.032cm" svg:y="12.954cm">
          <text:p text:style-name="P1"><text:span text:style-name="T12">2026.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8" draw:text-style-name="P2" draw:layer="layout" svg:width="8.127cm" svg:height="1.269cm" svg:x="7.112cm" svg:y="12.954cm">
          <text:p text:style-name="P1"><text:span text:style-name="T13">Claude Code </text:span><text:span text:style-name="T13">導入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9" draw:text-style-name="P2" draw:layer="layout" svg:width="16.509cm" svg:height="1.269cm" svg:x="15.748cm" svg:y="12.954cm">
          <text:p text:style-name="P1"><text:span text:style-name="T14">md</text:span><text:span text:style-name="T14">ファイル</text:span><text:span text:style-name="T14">1</text:span><text:span text:style-name="T14">枚で会社を作れた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0" draw:text-style-name="P2" draw:layer="layout" svg:width="4.571cm" svg:height="1.269cm" svg:x="2.032cm" svg:y="14.605cm">
          <text:p text:style-name="P1"><text:span text:style-name="T12">2026.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1" draw:text-style-name="P2" draw:layer="layout" svg:width="8.127cm" svg:height="1.269cm" svg:x="7.112cm" svg:y="14.605cm">
          <text:p text:style-name="P1"><text:span text:style-name="T13">AI</text:span><text:span text:style-name="T13">幕府 始動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2" draw:text-style-name="P2" draw:layer="layout" svg:width="16.509cm" svg:height="1.269cm" svg:x="15.748cm" svg:y="14.605cm">
          <text:p text:style-name="P1"><text:span text:style-name="T14">エージェント</text:span><text:span text:style-name="T14">12</text:span><text:span text:style-name="T14">体。江戸幕府モデル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3" draw:text-style-name="P2" draw:layer="layout" svg:width="4.571cm" svg:height="1.269cm" svg:x="2.032cm" svg:y="16.256cm">
          <text:p text:style-name="P1"><text:span text:style-name="T12">2026.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4" draw:text-style-name="P2" draw:layer="layout" svg:width="8.127cm" svg:height="1.269cm" svg:x="7.112cm" svg:y="16.256cm">
          <text:p text:style-name="P1"><text:span text:style-name="T13">現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5" draw:text-style-name="P2" draw:layer="layout" svg:width="16.509cm" svg:height="1.269cm" svg:x="15.748cm" svg:y="16.256cm">
          <text:p text:style-name="P1"><text:span text:style-name="T14">放置で回る構造が完成しつつあ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TextBox 1" draw:style-name="gr46" draw:text-style-name="P2" draw:layer="layout" svg:width="20.319cm" svg:height="1.015cm" svg:x="2.032cm" svg:y="1.27cm">
          <text:p text:style-name="P1"><text:span text:style-name="T15">CHAPTER 04 · TURNING PO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7" draw:text-style-name="P6" draw:layer="layout" svg:width="2.539cm" svg:height="0.761cm" svg:x="30.48cm" svg:y="17.78cm">
          <text:p text:style-name="P5"><text:span text:style-name="T6">6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8" draw:text-style-name="P2" draw:layer="layout" svg:width="25.399cm" svg:height="3.047cm" svg:x="2.032cm" svg:y="3.048cm">
          <text:p text:style-name="P1"><text:span text:style-name="T16">Claude </text:span><text:span text:style-name="T16">Code</text:span><text:span text:style-name="T16">との</text:span><text:span text:style-name="T16">出会いが</text:span><text:span text:style-name="T16"><text:line-break/></text:span><text:span text:style-name="T16">すべてを変</text:span><text:span text:style-name="T16">えた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5.079cm" svg:height="0.14cm" svg:x="2.032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9" draw:text-style-name="P8" draw:layer="layout" svg:width="13.969cm" svg:height="8.889cm" svg:x="2.032cm" svg:y="8.636cm">
          <text:p text:style-name="P7"><text:span text:style-name="T17">CLAUDE.md </text:span><text:span text:style-name="T17">というファイル</text:span><text:span text:style-name="T17">1</text:span><text:span text:style-name="T17">枚に、</text:span></text:p>
          <text:p text:style-name="P7"><text:span text:style-name="T17">会社の憲法を書いた。</text:span></text:p>
          <text:p text:style-name="P7"><text:span text:style-name="T17"/></text:p>
          <text:p text:style-name="P7"><text:span text:style-name="T17">AI</text:span><text:span text:style-name="T17">がそれを読んで、</text:span></text:p>
          <text:p text:style-name="P7"><text:span text:style-name="T17">自律的に仕事を始めた。</text:span></text:p>
          <text:p text:style-name="P7"><text:span text:style-name="T17"/></text:p>
          <text:p text:style-name="P7"><text:span text:style-name="T17">プログラミング初心者の僕が、</text:span></text:p>
          <text:p text:style-name="P7"><text:span text:style-name="T17">AI</text:span><text:span text:style-name="T17">の「上司」になった瞬間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0" draw:text-style-name="P12" draw:layer="layout" svg:width="13.461cm" svg:height="8.889cm" svg:x="18.288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1" draw:text-style-name="P11" draw:layer="layout" svg:width="12.191cm" svg:height="7.619cm" svg:x="19.05cm" svg:y="8.128cm">
          <text:p text:style-name="P10"><text:span text:style-name="T18">【ここにスクショを貼る】</text:span></text:p>
          <text:p text:style-name="P10"><text:span text:style-name="T18"/></text:p>
          <text:p text:style-name="P10"><text:span text:style-name="T18">・</text:span><text:span text:style-name="T18">CLAUDE.md </text:span><text:span text:style-name="T18">の冒頭部分</text:span></text:p>
          <text:p text:style-name="P10"><text:span text:style-name="T18">・または </text:span><text:span text:style-name="T18">Claude Code </text:span><text:span text:style-name="T18">の</text:span></text:p>
          <text:p text:style-name="P10"><text:span text:style-name="T18"><text:s text:c="2"/>セッション画面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TextBox 1" draw:style-name="gr52" draw:text-style-name="P2" draw:layer="layout" svg:width="15.239cm" svg:height="1.015cm" svg:x="2.032cm" svg:y="1.524cm">
          <text:p text:style-name="P1"><text:span text:style-name="T5">CHAPTER 04 · AI BAKUF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3" draw:text-style-name="P6" draw:layer="layout" svg:width="2.539cm" svg:height="0.761cm" svg:x="30.48cm" svg:y="17.78cm">
          <text:p text:style-name="P5"><text:span text:style-name="T6">7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4" draw:text-style-name="P2" draw:layer="layout" svg:width="25.399cm" svg:height="2.031cm" svg:x="2.032cm" svg:y="3.048cm">
          <text:p text:style-name="P1"><text:span text:style-name="T7">AI</text:span><text:span text:style-name="T7">幕府 — </text:span><text:span text:style-name="T7">12</text:span><text:span text:style-name="T7">体のエージェント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5" draw:text-style-name="P13" draw:layer="layout" svg:width="7.365cm" svg:height="3.301cm" svg:x="2.032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6" draw:text-style-name="P2" draw:layer="layout" svg:width="6.603cm" svg:height="1.015cm" svg:x="2.413cm" svg:y="6.604cm">
          <text:p text:style-name="P1"><text:span text:style-name="T19">将軍（</text:span><text:span text:style-name="T19">Claude Code</text:span><text:span text:style-name="T19">）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" draw:text-style-name="P2" draw:layer="layout" svg:width="6.603cm" svg:height="1.777cm" svg:x="2.413cm" svg:y="7.747cm">
          <text:p text:style-name="P1"><text:span text:style-name="T20">幕府統括。タスク自動判断・委任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5" draw:text-style-name="P13" draw:layer="layout" svg:width="7.365cm" svg:height="3.301cm" svg:x="9.906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8" draw:text-style-name="P2" draw:layer="layout" svg:width="6.603cm" svg:height="1.015cm" svg:x="10.287cm" svg:y="6.604cm">
          <text:p text:style-name="P1"><text:span text:style-name="T19">林 文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9" draw:text-style-name="P2" draw:layer="layout" svg:width="6.603cm" svg:height="1.777cm" svg:x="10.287cm" svg:y="7.747cm">
          <text:p text:style-name="P1"><text:span text:style-name="T20">瓦版方 — </text:span><text:span text:style-name="T20">コンテン</text:span><text:span text:style-name="T20">ツ・マー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5" draw:text-style-name="P13" draw:layer="layout" svg:width="7.365cm" svg:height="3.301cm" svg:x="17.78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0" draw:text-style-name="P2" draw:layer="layout" svg:width="6.603cm" svg:height="1.015cm" svg:x="18.161cm" svg:y="6.604cm">
          <text:p text:style-name="P1"><text:span text:style-name="T19">林 鳳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1" draw:text-style-name="P2" draw:layer="layout" svg:width="6.603cm" svg:height="1.777cm" svg:x="18.161cm" svg:y="7.747cm">
          <text:p text:style-name="P1"><text:span text:style-name="T20">頭取 — 開発・調査・戦</text:span><text:span text:style-name="T20">略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5" draw:text-style-name="P13" draw:layer="layout" svg:width="7.365cm" svg:height="3.301cm" svg:x="25.654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2" draw:text-style-name="P2" draw:layer="layout" svg:width="6.603cm" svg:height="1.015cm" svg:x="26.035cm" svg:y="6.604cm">
          <text:p text:style-name="P1"><text:span text:style-name="T19">本多 智房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3" draw:text-style-name="P2" draw:layer="layout" svg:width="6.603cm" svg:height="1.777cm" svg:x="26.035cm" svg:y="7.747cm">
          <text:p text:style-name="P1"><text:span text:style-name="T20">軍師 — 重い開発・設計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5" draw:text-style-name="P13" draw:layer="layout" svg:width="7.365cm" svg:height="3.301cm" svg:x="2.032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4" draw:text-style-name="P2" draw:layer="layout" svg:width="6.603cm" svg:height="1.015cm" svg:x="2.413cm" svg:y="10.668cm">
          <text:p text:style-name="P1"><text:span text:style-name="T19">向井 影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5" draw:text-style-name="P2" draw:layer="layout" svg:width="6.603cm" svg:height="1.777cm" svg:x="2.413cm" svg:y="11.811cm">
          <text:p text:style-name="P1"><text:span text:style-name="T20">御庭番 — 情報収集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13" draw:layer="layout" svg:width="7.365cm" svg:height="3.301cm" svg:x="9.906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6" draw:text-style-name="P2" draw:layer="layout" svg:width="6.603cm" svg:height="1.015cm" svg:x="10.287cm" svg:y="10.668cm">
          <text:p text:style-name="P1"><text:span text:style-name="T19">松平 算之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7" draw:text-style-name="P2" draw:layer="layout" svg:width="6.603cm" svg:height="1.777cm" svg:x="10.287cm" svg:y="11.811cm">
          <text:p text:style-name="P1"><text:span text:style-name="T20">勘定奉行 — 予算・使用量管理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5" draw:text-style-name="P13" draw:layer="layout" svg:width="7.365cm" svg:height="3.301cm" svg:x="17.78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8" draw:text-style-name="P2" draw:layer="layout" svg:width="6.603cm" svg:height="1.015cm" svg:x="18.161cm" svg:y="10.668cm">
          <text:p text:style-name="P1"><text:span text:style-name="T19">堀田 作兵衛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9" draw:text-style-name="P2" draw:layer="layout" svg:width="6.603cm" svg:height="1.777cm" svg:x="18.161cm" svg:y="11.811cm">
          <text:p text:style-name="P1"><text:span text:style-name="T20">普請奉行 — インフラ・自動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5" draw:text-style-name="P13" draw:layer="layout" svg:width="7.365cm" svg:height="3.301cm" svg:x="25.654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0" draw:text-style-name="P2" draw:layer="layout" svg:width="6.603cm" svg:height="1.015cm" svg:x="26.035cm" svg:y="10.668cm">
          <text:p text:style-name="P1"><text:span text:style-name="T19">酒井 辛之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1" draw:text-style-name="P2" draw:layer="layout" svg:width="6.603cm" svg:height="1.777cm" svg:x="26.035cm" svg:y="11.811cm">
          <text:p text:style-name="P1"><text:span text:style-name="T20">御意見番 — 提案審議・反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5" draw:text-style-name="P13" draw:layer="layout" svg:width="7.365cm" svg:height="3.301cm" svg:x="2.032cm" svg:y="14.4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72" draw:text-style-name="P2" draw:layer="layout" svg:width="6.603cm" svg:height="1.015cm" svg:x="2.413cm" svg:y="14.732cm">
          <text:p text:style-name="P1"><text:span text:style-name="T19">渡辺 右衛門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3" draw:text-style-name="P2" draw:layer="layout" svg:width="6.603cm" svg:height="1.777cm" svg:x="2.413cm" svg:y="15.875cm">
          <text:p text:style-name="P1"><text:span text:style-name="T20">目付 — 品質監査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5" draw:text-style-name="P13" draw:layer="layout" svg:width="7.365cm" svg:height="3.301cm" svg:x="9.906cm" svg:y="14.4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4" draw:text-style-name="P2" draw:layer="layout" svg:width="6.603cm" svg:height="1.015cm" svg:x="10.287cm" svg:y="14.732cm">
          <text:p text:style-name="P1"><text:span text:style-name="T19">長谷川 鋭真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5" draw:text-style-name="P2" draw:layer="layout" svg:width="6.603cm" svg:height="1.777cm" svg:x="10.287cm" svg:y="15.875cm">
          <text:p text:style-name="P1"><text:span text:style-name="T20">火付盗賊改 — セキュリティ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5" draw:text-style-name="P13" draw:layer="layout" svg:width="7.365cm" svg:height="3.301cm" svg:x="17.78cm" svg:y="14.4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76" draw:text-style-name="P2" draw:layer="layout" svg:width="6.603cm" svg:height="1.015cm" svg:x="18.161cm" svg:y="14.732cm">
          <text:p text:style-name="P1"><text:span text:style-name="T19">井伊 重蔵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7" draw:text-style-name="P2" draw:layer="layout" svg:width="6.603cm" svg:height="1.777cm" svg:x="18.161cm" svg:y="15.875cm">
          <text:p text:style-name="P1"><text:span text:style-name="T20">大目付 — </text:span><text:span text:style-name="T20">KPI</text:span><text:span text:style-name="T20">分析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55" draw:text-style-name="P13" draw:layer="layout" svg:width="7.365cm" svg:height="3.301cm" svg:x="25.654cm" svg:y="14.4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78" draw:text-style-name="P2" draw:layer="layout" svg:width="6.603cm" svg:height="1.015cm" svg:x="26.035cm" svg:y="14.732cm">
          <text:p text:style-name="P1"><text:span text:style-name="T19">大久保 蔵之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79" draw:text-style-name="P2" draw:layer="layout" svg:width="6.603cm" svg:height="1.777cm" svg:x="26.035cm" svg:y="15.875cm">
          <text:p text:style-name="P1"><text:span text:style-name="T20">蔵奉行 — </text:span><text:span text:style-name="T20">git</text:span><text:span text:style-name="T20">管理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TextBox 1" draw:style-name="gr80" draw:text-style-name="P2" draw:layer="layout" svg:width="15.239cm" svg:height="1.015cm" svg:x="2.032cm" svg:y="1.524cm">
          <text:p text:style-name="P1"><text:span text:style-name="T5">CHAPTER 04 · HOW I USE TH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1" draw:text-style-name="P6" draw:layer="layout" svg:width="2.539cm" svg:height="0.761cm" svg:x="30.48cm" svg:y="17.78cm">
          <text:p text:style-name="P5"><text:span text:style-name="T6">8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2" draw:text-style-name="P2" draw:layer="layout" svg:width="25.399cm" svg:height="2.031cm" svg:x="2.032cm" svg:y="3.048cm">
          <text:p text:style-name="P1"><text:span text:style-name="T7">今の使い分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5" draw:text-style-name="P13" draw:layer="layout" svg:width="14.731cm" svg:height="5.079cm" svg:x="2.032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3" draw:text-style-name="P2" draw:layer="layout" svg:width="10.159cm" svg:height="1.015cm" svg:x="2.54cm" svg:y="6.655cm">
          <text:p text:style-name="P1"><text:span text:style-name="T21">Claude 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4" draw:text-style-name="P6" draw:layer="layout" svg:width="3.555cm" svg:height="1.015cm" svg:x="12.7cm" svg:y="6.655cm">
          <text:p text:style-name="P5"><text:span text:style-name="T22">常時稼働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5" draw:text-style-name="P2" draw:layer="layout" svg:width="13.207cm" svg:height="3.047cm" svg:x="2.54cm" svg:y="8.001cm">
          <text:p text:style-name="P1"><text:span text:style-name="T23">メイン。将軍として全タスクを統括</text:span><text:span text:style-name="T23"><text:line-break/></text:span><text:span text:style-name="T23">12</text:span><text:span text:style-name="T23">体のサブエージェントを自律運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3" draw:layer="layout" svg:width="14.731cm" svg:height="5.079cm" svg:x="17.78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6" draw:text-style-name="P2" draw:layer="layout" svg:width="10.159cm" svg:height="1.015cm" svg:x="18.288cm" svg:y="6.655cm">
          <text:p text:style-name="P1"><text:span text:style-name="T21">Claude Sonnet/Op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7" draw:text-style-name="P6" draw:layer="layout" svg:width="3.555cm" svg:height="1.015cm" svg:x="28.448cm" svg:y="6.655cm">
          <text:p text:style-name="P5"><text:span text:style-name="T22">常時稼働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8" draw:text-style-name="P2" draw:layer="layout" svg:width="13.207cm" svg:height="3.047cm" svg:x="18.288cm" svg:y="8.001cm">
          <text:p text:style-name="P1"><text:span text:style-name="T23">テキスト生成・推敲（</text:span><text:span text:style-name="T23">Sonnet</text:span><text:span text:style-name="T23">）</text:span><text:span text:style-name="T23"><text:line-break/></text:span><text:span text:style-name="T23">重い思考・戦略検証（</text:span><text:span text:style-name="T23">Opus</text:span><text:span text:style-name="T23">）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5" draw:text-style-name="P13" draw:layer="layout" svg:width="14.731cm" svg:height="5.079cm" svg:x="2.032cm" svg:y="12.4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9" draw:text-style-name="P2" draw:layer="layout" svg:width="10.159cm" svg:height="1.015cm" svg:x="2.54cm" svg:y="12.751cm">
          <text:p text:style-name="P1"><text:span text:style-name="T21">Gemini Fla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0" draw:text-style-name="P6" draw:layer="layout" svg:width="3.555cm" svg:height="1.015cm" svg:x="12.7cm" svg:y="12.751cm">
          <text:p text:style-name="P5"><text:span text:style-name="T22">随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1" draw:text-style-name="P2" draw:layer="layout" svg:width="13.207cm" svg:height="3.047cm" svg:x="2.54cm" svg:y="14.097cm">
          <text:p text:style-name="P1"><text:span text:style-name="T23">クイック検索・画像認識</text:span><text:span text:style-name="T23"><text:line-break/></text:span><text:span text:style-name="T23">判断に迷った時のセカンドオピニオン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5" draw:text-style-name="P13" draw:layer="layout" svg:width="14.731cm" svg:height="5.079cm" svg:x="17.78cm" svg:y="12.4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2" draw:text-style-name="P2" draw:layer="layout" svg:width="10.159cm" svg:height="1.015cm" svg:x="18.288cm" svg:y="12.751cm">
          <text:p text:style-name="P1"><text:span text:style-name="T21">Ollama</text:span><text:span text:style-name="T21">（ローカル）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3" draw:text-style-name="P6" draw:layer="layout" svg:width="3.555cm" svg:height="1.015cm" svg:x="28.448cm" svg:y="12.751cm">
          <text:p text:style-name="P5"><text:span text:style-name="T22">実験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4" draw:text-style-name="P2" draw:layer="layout" svg:width="13.207cm" svg:height="3.047cm" svg:x="18.288cm" svg:y="14.097cm">
          <text:p text:style-name="P1"><text:span text:style-name="T23">qwen2.5:7b </text:span><text:span text:style-name="T23">で</text:span><text:span text:style-name="T23">A/B</text:span><text:span text:style-name="T23">検証</text:span><text:span text:style-name="T23"><text:line-break/></text:span><text:span text:style-name="T23">API</text:span><text:span text:style-name="T23">コストゼロで実験し放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TextBox 1" draw:style-name="gr95" draw:text-style-name="P2" draw:layer="layout" svg:width="15.239cm" svg:height="1.015cm" svg:x="2.032cm" svg:y="1.524cm">
          <text:p text:style-name="P1"><text:span text:style-name="T5">CHAPTER 04 · AUTONOMOUS LO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6" draw:text-style-name="P6" draw:layer="layout" svg:width="2.539cm" svg:height="0.761cm" svg:x="30.48cm" svg:y="17.78cm">
          <text:p text:style-name="P5"><text:span text:style-name="T6">9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7" draw:text-style-name="P2" draw:layer="layout" svg:width="25.399cm" svg:height="2.031cm" svg:x="2.032cm" svg:y="3.048cm">
          <text:p text:style-name="P1"><text:span text:style-name="T7">放置で回る構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8" draw:text-style-name="P8" draw:layer="layout" svg:width="27.939cm" svg:height="11.429cm" svg:x="2.032cm" svg:y="6.604cm">
          <text:p text:style-name="P7"><text:span text:style-name="T8">Mac mini M4</text:span><text:span text:style-name="T8">が</text:span><text:span text:style-name="T8">24</text:span><text:span text:style-name="T8">時間動いている。僕が寝ている間も。</text:span></text:p>
          <text:p text:style-name="P7"><text:span text:style-name="T8"/></text:p>
          <text:p text:style-name="P7"><text:span text:style-name="T11">2</text:span><text:span text:style-name="T11">時間ごと</text:span><text:span text:style-name="T8"> — 全市場スキャン＋自動トレード判定</text:span></text:p>
          <text:p text:style-name="P7"><text:span text:style-name="T11">15</text:span><text:span text:style-name="T11">分ごと</text:span><text:span text:style-name="T8"> — ポジション監視</text:span></text:p>
          <text:p text:style-name="P7"><text:span text:style-name="T11">30</text:span><text:span text:style-name="T11">分ごと</text:span><text:span text:style-name="T8"> — </text:span><text:span text:style-name="T8">AI</text:span><text:span text:style-name="T8">社員の死活チェック（</text:span><text:span text:style-name="T8">heartbeat</text:span><text:span text:style-name="T8">）</text:span></text:p>
          <text:p text:style-name="P7"><text:span text:style-name="T11">日</text:span><text:span text:style-name="T11">2</text:span><text:span text:style-name="T11">回</text:span><text:span text:style-name="T8"> — 卒業条件の自動判定</text:span></text:p>
          <text:p text:style-name="P7"><text:span text:style-name="T11">月</text:span><text:span text:style-name="T11">1</text:span><text:span text:style-name="T11">回</text:span><text:span text:style-name="T8"> — 資産配分の自動リバランス</text:span></text:p>
          <text:p text:style-name="P7"><text:span text:style-name="T8"/></text:p>
          <text:p text:style-name="P7"><text:span text:style-name="T8">僕の仕事は「意思決定」と「承認ボタン」だけ。</text:span></text:p>
          <text:p text:style-name="P7"><text:span text:style-name="T8">実行は全部</text:span><text:span text:style-name="T8">AI</text:span><text:span text:style-name="T8">がやる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TextBox 1" draw:style-name="gr99" draw:text-style-name="P2" draw:layer="layout" svg:width="15.239cm" svg:height="1.015cm" svg:x="2.032cm" svg:y="1.524cm">
          <text:p text:style-name="P1"><text:span text:style-name="T5">CHAPTER 05 · FAILU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0" draw:text-style-name="P6" draw:layer="layout" svg:width="2.539cm" svg:height="0.761cm" svg:x="30.48cm" svg:y="17.78cm">
          <text:p text:style-name="P5"><text:span text:style-name="T6">10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1" draw:text-style-name="P2" draw:layer="layout" svg:width="25.399cm" svg:height="2.031cm" svg:x="2.032cm" svg:y="3.048cm">
          <text:p text:style-name="P1"><text:span text:style-name="T7">失敗から学んだこ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5" draw:text-style-name="P13" draw:layer="layout" svg:width="14.731cm" svg:height="5.079cm" svg:x="2.032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2" draw:text-style-name="P2" draw:layer="layout" svg:width="13.715cm" svg:height="1.015cm" svg:x="2.54cm" svg:y="6.604cm">
          <text:p text:style-name="P1"><text:span text:style-name="T24">FAIL </text:span><text:span text:style-name="T24">01 — </text:span><text:span text:style-name="T24">API</text:span><text:span text:style-name="T24">キー</text:span><text:span text:style-name="T24">平文コ</text:span><text:span text:style-name="T24">ミット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3" draw:text-style-name="P11" draw:layer="layout" svg:width="13.715cm" svg:height="3.047cm" svg:x="2.54cm" svg:y="7.874cm">
          <text:p text:style-name="P10"><text:span text:style-name="T14">セキュリティ報告書に</text:span><text:span text:style-name="T14">API</text:span><text:span text:style-name="T14">キーをそのまま書いた。</text:span></text:p>
          <text:p text:style-name="P10"><text:span text:style-name="T14">git</text:span><text:span text:style-name="T14">履歴に残るから、消しても手遅れ。</text:span></text:p>
          <text:p text:style-name="P10"><text:span text:style-name="T14">→ 以降「先頭</text:span><text:span text:style-name="T14">4</text:span><text:span text:style-name="T14">文字 </text:span><text:span text:style-name="T14">+ ...</text:span><text:span text:style-name="T14">」ルールを全社徹底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5" draw:text-style-name="P13" draw:layer="layout" svg:width="14.731cm" svg:height="5.079cm" svg:x="17.78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4" draw:text-style-name="P2" draw:layer="layout" svg:width="13.715cm" svg:height="1.015cm" svg:x="18.288cm" svg:y="6.604cm">
          <text:p text:style-name="P1"><text:span text:style-name="T24">FAIL 02 — AI</text:span><text:span text:style-name="T24">プロセス暴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5" draw:text-style-name="P11" draw:layer="layout" svg:width="13.715cm" svg:height="3.047cm" svg:x="18.288cm" svg:y="7.874cm">
          <text:p text:style-name="P10"><text:span text:style-name="T14">ロードアベレージ</text:span><text:span text:style-name="T14">94→259</text:span><text:span text:style-name="T14">に急上昇。</text:span><text:span text:style-name="T14">Mac mini</text:span><text:span text:style-name="T14">が悲鳴。</text:span></text:p>
          <text:p text:style-name="P10"><text:span text:style-name="T14">Claude</text:span><text:span text:style-name="T14">が暴走して止まらなくなった。</text:span></text:p>
          <text:p text:style-name="P10"><text:span text:style-name="T14">→ ウォッチドッグ＋排他ロックを自動実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5" draw:text-style-name="P13" draw:layer="layout" svg:width="30.479cm" svg:height="4.571cm" svg:x="2.032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6" draw:text-style-name="P2" draw:layer="layout" svg:width="29.209cm" svg:height="1.015cm" svg:x="2.54cm" svg:y="12.954cm">
          <text:p text:style-name="P1"><text:span text:style-name="T24">FAIL 03 — </text:span><text:span text:style-name="T24">マイクラ</text:span><text:span text:style-name="T24">AI</text:span><text:span text:style-name="T24">が全部忘れた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7" draw:text-style-name="P11" draw:layer="layout" svg:width="29.209cm" svg:height="2.539cm" svg:x="2.54cm" svg:y="14.224cm">
          <text:p text:style-name="P10"><text:span text:style-name="T14">AI</text:span><text:span text:style-name="T14">に「マイクラで生きろ」と放り込んだ。拠点を</text:span><text:span text:style-name="T14">4</text:span><text:span text:style-name="T14">つ作った……のに全部忘れた。</text:span></text:p>
          <text:p text:style-name="P10"><text:span text:style-name="T14">地図で見たら</text:span><text:span text:style-name="T14">4</text:span><text:span text:style-name="T14">つの点が散らばってた。「家に帰ろう」という感覚、</text:span><text:span text:style-name="T14">AI</text:span><text:span text:style-name="T14">にはない。</text:span></text:p>
          <text:p text:style-name="P10"><text:span text:style-name="T14">→ AI</text:span><text:span text:style-name="T14">は「手書き記録の外では記憶を活用できない」。だから</text:span><text:span text:style-name="T14">CLAUDE.md</text:span><text:span text:style-name="T14">が必要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TextBox 1" draw:style-name="gr108" draw:text-style-name="P2" draw:layer="layout" svg:width="20.319cm" svg:height="1.015cm" svg:x="2.032cm" svg:y="1.27cm">
          <text:p text:style-name="P1"><text:span text:style-name="T15">CHAPTER 06 · WHAT CAN WE BUILD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9" draw:text-style-name="P6" draw:layer="layout" svg:width="2.539cm" svg:height="0.761cm" svg:x="30.48cm" svg:y="17.78cm">
          <text:p text:style-name="P5"><text:span text:style-name="T6">11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0" draw:text-style-name="P2" draw:layer="layout" svg:width="25.399cm" svg:height="3.047cm" svg:x="2.032cm" svg:y="3.302cm">
          <text:p text:style-name="P1"><text:span text:style-name="T16">AI</text:span><text:span text:style-name="T16">で自分の仕事を</text:span><text:span text:style-name="T16"><text:line-break/></text:span><text:span text:style-name="T16">どう変える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5.079cm" svg:height="0.14cm" svg:x="2.032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1" draw:text-style-name="P11" draw:layer="layout" svg:width="27.939cm" svg:height="8.889cm" svg:x="2.032cm" svg:y="9.144cm">
          <text:p text:style-name="P10"><text:span text:style-name="T17">AI</text:span><text:span text:style-name="T17">の使い道は人それぞれ。自分の現場で「これ面倒だな」を探す。</text:span></text:p>
          <text:p text:style-name="P10"><text:span text:style-name="T17"/></text:p>
          <text:p text:style-name="P10"><text:span text:style-name="T17">・コードレビューの要約を自動で出す</text:span></text:p>
          <text:p text:style-name="P10"><text:span text:style-name="T17">・ドキュメントを食わせて質問できる</text:span><text:span text:style-name="T17">Bot</text:span><text:span text:style-name="T17">を作る</text:span></text:p>
          <text:p text:style-name="P10"><text:span text:style-name="T17">・定型作業をエージェントに任せて放置する</text:span></text:p>
          <text:p text:style-name="P10"><text:span text:style-name="T17">・聞こえる前提で設計された仕組みを、自分たちに合う形に作り替える</text:span></text:p>
          <text:p text:style-name="P10"><text:span text:style-name="T17"/></text:p>
          <text:p text:style-name="P10"><text:span text:style-name="T17">今日のハッカソンで、</text:span><text:span text:style-name="T17">1</text:span><text:span text:style-name="T17">つ試してみよう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TextBox 1" draw:style-name="gr112" draw:text-style-name="P2" draw:layer="layout" svg:width="15.239cm" svg:height="1.015cm" svg:x="2.032cm" svg:y="1.524cm">
          <text:p text:style-name="P1"><text:span text:style-name="T5">CHAPTER 07 · OUTLOO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3" draw:text-style-name="P6" draw:layer="layout" svg:width="2.539cm" svg:height="0.761cm" svg:x="30.48cm" svg:y="17.78cm">
          <text:p text:style-name="P5"><text:span text:style-name="T6">12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4" draw:text-style-name="P2" draw:layer="layout" svg:width="25.399cm" svg:height="2.031cm" svg:x="2.032cm" svg:y="3.048cm">
          <text:p text:style-name="P1"><text:span text:style-name="T7">これからの使い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5" draw:text-style-name="P15" draw:layer="layout" svg:width="27.939cm" svg:height="11.429cm" svg:x="2.032cm" svg:y="6.604cm">
          <text:p text:style-name="P14"><text:span text:style-name="T8">AI</text:span><text:span text:style-name="T8">時代に人間に残る価値は「判断力」だと思って</text:span><text:span text:style-name="T8">いる。</text:span></text:p>
          <text:p text:style-name="P14"><text:span text:style-name="T8"/></text:p>
          <text:p text:style-name="P14"><text:span text:style-name="T11">① 実行は</text:span><text:span text:style-name="T11">AI</text:span><text:span text:style-name="T11">に任せる。人間は判断だけする。</text:span></text:p>
          <text:p text:style-name="P14"><text:span text:style-name="T8"><text:s text:c="3"/>コードを書く力より、何を作るか決める力。</text:span></text:p>
          <text:p text:style-name="P14"><text:span text:style-name="T8"/></text:p>
          <text:p text:style-name="P14"><text:span text:style-name="T11">② プログラミング初心者でも、</text:span><text:span text:style-name="T11">AI</text:span><text:span text:style-name="T11">で戦える。</text:span></text:p>
          <text:p text:style-name="P14"><text:span text:style-name="T8"><text:s text:c="3"/>CLAUDE.md 1</text:span><text:span text:style-name="T8">枚で</text:span><text:span text:style-name="T8">12</text:span><text:span text:style-name="T8">体の</text:span><text:span text:style-name="T8">AI</text:span><text:span text:style-name="T8">を動かせる時代。</text:span></text:p>
          <text:p text:style-name="P14"><text:span text:style-name="T8"/></text:p>
          <text:p text:style-name="P14"><text:span text:style-name="T11">③ デフエンジニアの武器にする。</text:span></text:p>
          <text:p text:style-name="P14"><text:span text:style-name="T8"><text:s text:c="3"/>「聞こえない」を不利ではなく、</text:span><text:span text:style-name="T8">AI</text:span><text:span text:style-name="T8">で超える対</text:span><text:span text:style-name="T8">象に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>
        <draw:custom-shape draw:name="TextBox 1" draw:style-name="gr116" draw:text-style-name="P2" draw:layer="layout" svg:width="15.239cm" svg:height="1.015cm" svg:x="2.032cm" svg:y="1.524cm">
          <text:p text:style-name="P1"><text:span text:style-name="T5">TODAY'S GO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7" draw:text-style-name="P6" draw:layer="layout" svg:width="2.539cm" svg:height="0.761cm" svg:x="30.48cm" svg:y="17.78cm">
          <text:p text:style-name="P5"><text:span text:style-name="T6">13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8" draw:text-style-name="P2" draw:layer="layout" svg:width="25.399cm" svg:height="2.031cm" svg:x="2.032cm" svg:y="3.048cm">
          <text:p text:style-name="P1"><text:span text:style-name="T7">今日やるこ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3.809cm" svg:height="0.14cm" svg:x="2.03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9" draw:text-style-name="P15" draw:layer="layout" svg:width="27.939cm" svg:height="11.429cm" svg:x="2.032cm" svg:y="6.604cm">
          <text:p text:style-name="P14"><text:span text:style-name="T25">① 自分に合った</text:span><text:span text:style-name="T25">AI</text:span><text:span text:style-name="T25">ツールを</text:span><text:span text:style-name="T25">1</text:span><text:span text:style-name="T25">つ見つける</text:span></text:p>
          <text:p text:style-name="P14"><text:span text:style-name="T26"><text:s text:c="3"/>全部使う必要はない。</text:span><text:span text:style-name="T26">1</text:span><text:span text:style-name="T26">つ「これ」を持って帰ればいい。</text:span></text:p>
          <text:p text:style-name="P14"><text:span text:style-name="T26"/></text:p>
          <text:p text:style-name="P14"><text:span text:style-name="T25">② チームで「動くもの」を作る</text:span></text:p>
          <text:p text:style-name="P14"><text:span text:style-name="T26"><text:s text:c="3"/>完璧じゃなくていい。</text:span><text:span text:style-name="T26">3</text:span><text:span text:style-name="T26">時間で「動く」が最優先。</text:span></text:p>
          <text:p text:style-name="P14"><text:span text:style-name="T26"/></text:p>
          <text:p text:style-name="P14"><text:span text:style-name="T25">③ 「次に何をやるか」を決めて帰る</text:span></text:p>
          <text:p text:style-name="P14"><text:span text:style-name="T26"><text:s text:c="3"/>今日の</text:span><text:span text:style-name="T26">12</text:span><text:span text:style-name="T26">時間を、明日からの武器にする。</text:span></text:p>
          <text:p text:style-name="P14"><text:span text:style-name="T26"/></text:p>
          <text:p text:style-name="P14"><text:span text:style-name="T26"/></text:p>
          <text:p text:style-name="P14"><text:span text:style-name="T26">では、午後のハッカソンで実際に作りましょう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presentation:notes draw:style-name="dp2">
          <draw:page-thumbnail draw:style-name="gr6" draw:layer="layout" svg:width="0.001cm" svg:height="0.002cm" svg:x="0.004cm" svg:y="0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TextBox 1" draw:style-name="gr120" draw:text-style-name="P2" draw:layer="layout" svg:width="25.399cm" svg:height="6.349cm" svg:x="2.032cm" svg:y="5.588cm">
          <text:p text:style-name="P1"><text:span text:style-name="T27">登る山を</text:span><text:span text:style-name="T27"><text:line-break/></text:span><text:span text:style-name="T27">決めよう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3" draw:layer="layout" svg:width="5.079cm" svg:height="0.14cm" svg:x="2.032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1" draw:text-style-name="P2" draw:layer="layout" svg:width="25.399cm" svg:height="1.523cm" svg:x="2.032cm" svg:y="13.97cm">
          <text:p text:style-name="P1"><text:span text:style-name="T3">質問・感想、なんでも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2" draw:layer="layout" svg:width="25.399cm" svg:height="1.269cm" svg:x="2.032cm" svg:y="16.002cm">
          <text:p text:style-name="P1"><text:span text:style-name="T4">Deaf Engineers AI Workshop Vol.01 · 2026.05.3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">
        <presentation:notes draw:style-name="dp2">
          <draw:page-thumbnail draw:style-name="gr6" draw:layer="layout" svg:width="0.001cm" svg:height="0.002cm" svg:x="0.004cm" svg:y="0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JetBrains Mono" svg:font-family="'JetBrains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/>
    <style:font-face style:name="Tahoma" svg:font-family="Tahoma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游ゴシック体" style:font-family-asian="游ゴシック体" style:font-family-generic-asian="system" style:font-pitch-asian="variable" style:font-size-asian="40pt" style:font-style-asian="normal" style:font-weight-asian="bold" style:font-name-complex="Arial Unicode MS" style:font-family-complex="'Arial Unicode M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bold" style:font-name-complex="Arial Unicode MS" style:font-family-complex="'Arial Unicode M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游ゴシック体" style:font-family-asian="游ゴシック体" style:font-family-generic-asian="system" style:font-pitch-asian="variable" style:font-size-asian="20pt" style:font-style-asian="normal" style:font-weight-asian="bold" style:font-name-complex="Arial Unicode MS" style:font-family-complex="'Arial Unicode M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4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4-24T23:05:26.622710000</dc:date>
    <meta:editing-duration>PT21H20M56S</meta:editing-duration>
    <meta:generator>LibreOffice/26.2.1.2$MacOSX_AARCH64 LibreOffice_project/8399f6259d8c87f40e7255cdb3c9b958f5e08948</meta:generator>
    <meta:document-statistic meta:object-count="320"/>
    <meta:user-defined meta:name="AppVersion">14.0000</meta:user-defined>
    <meta:user-defined meta:name="PresentationFormat">On-screen Show (4:3)</meta:user-defined>
  </office:meta>
</office:document-meta>
</file>